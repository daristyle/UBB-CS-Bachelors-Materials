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035d69" officeooo:paragraph-rsid="00035d69" style:font-size-asian="17.5pt" style:font-size-complex="20pt"/>
    </style:style>
    <style:style style:name="P2" style:family="paragraph" style:parent-style-name="Standard">
      <style:text-properties fo:font-size="12pt" officeooo:rsid="00035d69" officeooo:paragraph-rsid="00035d69" style:font-size-asian="10.5pt" style:font-size-complex="12pt"/>
    </style:style>
    <style:style style:name="P3" style:family="paragraph" style:parent-style-name="Standard" style:list-style-name="L1">
      <style:text-properties fo:font-size="12pt" officeooo:rsid="00035d69" officeooo:paragraph-rsid="000608e2" style:font-size-asian="10.5pt" style:font-size-complex="12pt"/>
    </style:style>
    <style:style style:name="P4" style:family="paragraph" style:parent-style-name="Standard" style:list-style-name="L1">
      <style:paragraph-properties style:writing-mode="lr-tb" style:writing-mode-automatic="false"/>
      <style:text-properties fo:font-size="12pt" officeooo:rsid="00035d69" officeooo:paragraph-rsid="000608e2" style:font-size-asian="10.5pt" style:font-size-complex="12pt"/>
    </style:style>
    <style:style style:name="P5" style:family="paragraph" style:parent-style-name="Standard" style:list-style-name="L2">
      <style:text-properties fo:font-size="12pt" officeooo:rsid="00035d69" officeooo:paragraph-rsid="00035d69" style:font-size-asian="10.5pt" style:font-size-complex="12pt"/>
    </style:style>
    <style:style style:name="P6" style:family="paragraph" style:parent-style-name="Standard" style:list-style-name="L2">
      <style:paragraph-properties style:writing-mode="lr-tb" style:writing-mode-automatic="false"/>
      <style:text-properties fo:font-size="12pt" officeooo:rsid="00035d69" officeooo:paragraph-rsid="00035d69" style:font-size-asian="10.5pt" style:font-size-complex="12pt"/>
    </style:style>
    <style:style style:name="P7" style:family="paragraph" style:parent-style-name="Standard" style:list-style-name="L2">
      <style:paragraph-properties style:writing-mode="lr-tb" style:writing-mode-automatic="false"/>
      <style:text-properties fo:font-size="12pt" officeooo:rsid="00035d69" officeooo:paragraph-rsid="0003a76a" style:font-size-asian="10.5pt" style:font-size-complex="12pt"/>
    </style:style>
    <style:style style:name="P8" style:family="paragraph" style:parent-style-name="Standard">
      <style:paragraph-properties style:writing-mode="lr-tb" style:writing-mode-automatic="false"/>
      <style:text-properties fo:font-size="12pt" officeooo:rsid="00047ea1" officeooo:paragraph-rsid="00047ea1" style:font-size-asian="10.5pt" style:font-size-complex="12pt"/>
    </style:style>
    <style:style style:name="P9" style:family="paragraph" style:parent-style-name="Standard" style:list-style-name="L3">
      <style:paragraph-properties style:writing-mode="lr-tb" style:writing-mode-automatic="false"/>
      <style:text-properties fo:font-size="12pt" officeooo:rsid="00047ea1" officeooo:paragraph-rsid="00047ea1" style:font-size-asian="10.5pt" style:font-size-complex="12pt"/>
    </style:style>
    <style:style style:name="P10" style:family="paragraph" style:parent-style-name="Standard">
      <style:paragraph-properties style:writing-mode="lr-tb" style:writing-mode-automatic="false"/>
      <style:text-properties fo:font-size="20pt" officeooo:rsid="00035d69" officeooo:paragraph-rsid="00035d69" style:font-size-asian="17.5pt" style:font-size-complex="20pt"/>
    </style:style>
    <style:style style:name="P11" style:family="paragraph" style:parent-style-name="Standard">
      <style:paragraph-properties style:writing-mode="lr-tb" style:writing-mode-automatic="false"/>
      <style:text-properties fo:font-size="12pt" officeooo:rsid="000608e2" officeooo:paragraph-rsid="000608e2" style:font-size-asian="10.5pt" style:font-size-complex="12pt"/>
    </style:style>
    <style:style style:name="T1" style:family="text">
      <style:text-properties officeooo:rsid="000608e2"/>
    </style:style>
    <style:style style:name="T2" style:family="text">
      <style:text-properties officeooo:rsid="0003a76a"/>
    </style:style>
    <style:style style:name="T3" style:family="text">
      <style:text-properties officeooo:rsid="00047ea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ification</text:p>
      <text:p text:style-name="P2"/>
      <text:p text:style-name="P2">The class Graph represents a directed graph.</text:p>
      <text:p text:style-name="P2">We need the auxiliary class IteratorRange which helps us iterate through vertices. <text:span text:style-name="T1">It has the followinf methods:</text:span></text:p>
      <text:list text:style-name="L1">
        <text:list-item>
          <text:p text:style-name="P3">IteratorRange(It begin, It end); → <text:span text:style-name="T1">construct an </text:span>IteratorRange<text:span text:style-name="T1"> with the specified begin and end</text:span></text:p>
        </text:list-item>
        <text:list-item>
          <text:p text:style-name="P3">It begin() const;→ <text:span text:style-name="T1">retunrs the begin of the </text:span>IteratorRange</text:p>
        </text:list-item>
        <text:list-item>
          <text:p text:style-name="P4">It end() const;→<text:span text:style-name="T1">returns the end of the </text:span>IteratorRange</text:p>
        </text:list-item>
      </text:list>
      <text:p text:style-name="P2">The Graph class has the following methods:</text:p>
      <text:list text:style-name="L2">
        <text:list-item>
          <text:p text:style-name="P5">Graph(int noVertices); → constructs a graph with noVertices vertices and no arcs</text:p>
        </text:list-item>
        <text:list-item>
          <text:p text:style-name="P5">Graph(const Graph&amp; g); → copy constructor</text:p>
        </text:list-item>
        <text:list-item>
          <text:p text:style-name="P5">int noVertices(); → returns the number of vertices in the graph</text:p>
        </text:list-item>
        <text:list-item>
          <text:p text:style-name="P5">int noEdges(); → returns the number of edges in the graph</text:p>
        </text:list-item>
        <text:list-item>
          <text:p text:style-name="P6">IteratorRange&lt;set&lt;int&gt;::const_iterator&gt; getVertices(); → returns an iterator on the set of vertices</text:p>
        </text:list-item>
        <text:list-item>
          <text:p text:style-name="P6">bool isEdge(int v1, int v2); → returns true iff there is an arc from v1 to v2</text:p>
        </text:list-item>
        <text:list-item>
          <text:p text:style-name="P6">int inDegree(int v); → returns the in degree of the vertex v</text:p>
        </text:list-item>
        <text:list-item>
          <text:p text:style-name="P6">int outDegree(int v); → returns the out degree of the vertex v</text:p>
        </text:list-item>
        <text:list-item>
          <text:p text:style-name="P6">IteratorRange&lt;vector&lt;int&gt;::const_iterator&gt; getOutboundNeighbours(int v); → <text:span text:style-name="T2">returns an interator on the set of the out neighbours of v</text:span></text:p>
        </text:list-item>
        <text:list-item>
          <text:p text:style-name="P6">IteratorRange&lt;vector&lt;int&gt;::const_iterator&gt; getInboundNeighbours(int v); → <text:span text:style-name="T2">returns an iterator on the set of the in neighbours of v</text:span></text:p>
        </text:list-item>
        <text:list-item>
          <text:p text:style-name="P6">void setCost(int v1, int v2, int cost); → <text:span text:style-name="T2">sets the <text:s/>cost of the arc from v1 to v2 to cost if the arc exists, if it does not it does nothing</text:span></text:p>
        </text:list-item>
        <text:list-item>
          <text:p text:style-name="P6">int getCost(int v1, int v2); <text:s/>→ <text:span text:style-name="T2">returns the cost of the arc from v1 to v2 if it exists and -1 if it does not</text:span></text:p>
        </text:list-item>
        <text:list-item>
          <text:p text:style-name="P7">void addEdge(int v1, int v2, int cost = 0); → <text:span text:style-name="T2">adds an edge to the graph from v1 to v2 with </text:span><text:span text:style-name="T3">the specified cost</text:span></text:p>
        </text:list-item>
        <text:list-item>
          <text:p text:style-name="P7">void removeEdge(int v1, int v2); → <text:span text:style-name="T3">remove the arc from v1 to v2 if it exits, does nothing if it does not exist</text:span></text:p>
        </text:list-item>
        <text:list-item>
          <text:p text:style-name="P7">void addVertex(int v); → <text:span text:style-name="T3">adds the vertex v to the graph</text:span></text:p>
        </text:list-item>
        <text:list-item>
          <text:p text:style-name="P7">void removeVertex(int v);→ <text:span text:style-name="T3">removes the vertex v from the graph</text:span></text:p>
        </text:list-item>
        <text:list-item>
          <text:p text:style-name="P7">Graph&amp; operator=(const Graph&amp; g); → <text:span text:style-name="T3">assignment operator</text:span></text:p>
        </text:list-item>
      </text:list>
      <text:p text:style-name="P8">We also havee the following external functions:</text:p>
      <text:list text:style-name="L3">
        <text:list-item>
          <text:p text:style-name="P9">Graph readGraph(std::istream&amp; in); → reads and returns the graph from the stream in</text:p>
        </text:list-item>
        <text:list-item>
          <text:p text:style-name="P9">void printGraph(Graph&amp; g, std::ostream&amp; out); → prints g in the stream out</text:p>
        </text:list-item>
        <text:list-item>
          <text:p text:style-name="P9">Graph generateRandomGraph(int noVertices, int noEdges, bool cost = false);→ generates and returns a random graph with the specified number of vertices and edges, if cost is true it will also give cost between 0 and 100 to the edges, otherwise it gives costs of 0</text:p>
        </text:list-item>
      </text:list>
      <text:p text:style-name="P10">Implementation</text:p>
      <text:p text:style-name="P11"/>
      <text:p text:style-name="P11">We have a 2 maps that map every vertex to <text:s/>a vector of its in neighbours and out neighbours. We also have a map that maps every edge, encoded as a pair of vertices, to its cost and we keep a set with all the active vertic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4:45:55.372087593</meta:creation-date>
    <dc:date>2026-03-25T22:40:51.387757728</dc:date>
    <meta:editing-duration>PT10M10S</meta:editing-duration>
    <meta:editing-cycles>3</meta:editing-cycles>
    <meta:generator>LibreOffice/26.2.2.2$Linux_X86_64 LibreOffice_project/620$Build-2</meta:generator>
    <meta:print-date>2026-03-25T21:58:06.700579417</meta:print-date>
    <meta:printed-by>PDF files</meta:printed-by>
    <meta:document-statistic meta:table-count="0" meta:image-count="0" meta:object-count="0" meta:page-count="1" meta:paragraph-count="30" meta:word-count="466" meta:character-count="2580" meta:non-whitespace-character-count="2164"/>
  </office:meta>
</office:document-meta>
</file>