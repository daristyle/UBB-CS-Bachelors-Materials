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0f1162" officeooo:paragraph-rsid="000f1162" style:font-size-asian="17.5pt" style:font-size-complex="20pt"/>
    </style:style>
    <style:style style:name="P2" style:family="paragraph" style:parent-style-name="Standard">
      <style:text-properties fo:font-size="12pt" officeooo:rsid="000f1162" officeooo:paragraph-rsid="000f1162" style:font-size-asian="10.5pt" style:font-size-complex="12pt"/>
    </style:style>
    <style:style style:name="P3" style:family="paragraph" style:parent-style-name="Standard" style:list-style-name="L1">
      <style:text-properties fo:font-size="12pt" officeooo:rsid="000f1162" officeooo:paragraph-rsid="000f1162" style:font-size-asian="10.5pt" style:font-size-complex="12pt"/>
    </style:style>
    <style:style style:name="P4" style:family="paragraph" style:parent-style-name="Standard" style:list-style-name="L1">
      <style:paragraph-properties style:writing-mode="lr-tb" style:writing-mode-automatic="false"/>
      <style:text-properties fo:font-size="12pt" officeooo:rsid="000f1162" officeooo:paragraph-rsid="000f1162" style:font-size-asian="10.5pt" style:font-size-complex="12pt"/>
    </style:style>
    <style:style style:name="P5" style:family="paragraph" style:parent-style-name="Standard" style:list-style-name="L1">
      <style:paragraph-properties style:writing-mode="lr-tb" style:writing-mode-automatic="false"/>
      <style:text-properties fo:font-size="12pt" style:text-underline-style="none" officeooo:rsid="000f1162" officeooo:paragraph-rsid="000f1162" style:font-size-asian="10.5pt" style:font-size-complex="12pt"/>
    </style:style>
    <style:style style:name="P6" style:family="paragraph" style:parent-style-name="Standard" style:list-style-name="L1">
      <style:paragraph-properties style:writing-mode="lr-tb" style:writing-mode-automatic="false"/>
      <style:text-properties officeooo:paragraph-rsid="000f1162"/>
    </style:style>
    <style:style style:name="P7" style:family="paragraph" style:parent-style-name="Standard" style:list-style-name="L1">
      <style:paragraph-properties style:writing-mode="lr-tb" style:writing-mode-automatic="false"/>
      <style:text-properties officeooo:paragraph-rsid="00107f50"/>
    </style:style>
    <style:style style:name="P8" style:family="paragraph" style:parent-style-name="Standard" style:list-style-name="L1">
      <style:paragraph-properties style:writing-mode="lr-tb" style:writing-mode-automatic="false"/>
      <style:text-properties officeooo:rsid="00107f50" officeooo:paragraph-rsid="00107f50"/>
    </style:style>
    <style:style style:name="P9" style:family="paragraph" style:parent-style-name="Standard">
      <style:paragraph-properties style:writing-mode="lr-tb" style:writing-mode-automatic="false"/>
      <style:text-properties officeooo:rsid="001088a9" officeooo:paragraph-rsid="001088a9"/>
    </style:style>
    <style:style style:name="P10" style:family="paragraph" style:parent-style-name="Standard" style:list-style-name="L2">
      <style:paragraph-properties style:writing-mode="lr-tb" style:writing-mode-automatic="false"/>
      <style:text-properties officeooo:rsid="001088a9" officeooo:paragraph-rsid="001088a9"/>
    </style:style>
    <style:style style:name="P11" style:family="paragraph" style:parent-style-name="Standard">
      <style:text-properties fo:font-size="12pt" officeooo:rsid="001088a9" officeooo:paragraph-rsid="001088a9" style:font-size-asian="10.5pt" style:font-size-complex="12pt"/>
    </style:style>
    <style:style style:name="T1" style:family="text">
      <style:text-properties fo:font-size="12pt" style:text-underline-style="none" officeooo:rsid="000f1162" style:font-size-asian="10.5pt" style:font-size-complex="12pt"/>
    </style:style>
    <style:style style:name="T2" style:family="text">
      <style:text-properties fo:font-size="12pt" style:text-underline-style="none" officeooo:rsid="00107f50" style:font-size-asian="10.5pt" style:font-size-complex="12pt"/>
    </style:style>
    <style:style style:name="T3" style:family="text">
      <style:text-properties officeooo:rsid="000f1162"/>
    </style:style>
    <style:style style:name="T4" style:family="text">
      <style:text-properties officeooo:rsid="00107f50"/>
    </style:style>
    <style:style style:name="T5" style:family="text">
      <style:text-properties officeooo:rsid="001088a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ification</text:p>
      <text:p text:style-name="P2"/>
      <text:p text:style-name="P2">The class Graph represents a directed graph and has the following methods:</text:p>
      <text:list text:style-name="L1">
        <text:list-item>
          <text:p text:style-name="P3">def __init__(self, no_vertices) → constructs a graph with the specified number of vertices</text:p>
        </text:list-item>
        <text:list-item>
          <text:p text:style-name="P3">def addEdge(self, x, y, cost = 0) → adds an arc to the graph from the vertex x to vertex y with the specified cost</text:p>
        </text:list-item>
        <text:list-item>
          <text:p text:style-name="P4">def getVertices(self) → returns an iterator to the vertices in the graph</text:p>
        </text:list-item>
        <text:list-item>
          <text:p text:style-name="P4">def getOutNeighbours(self, vertex) → returns an iterator to the out neighbours of the specified vertex</text:p>
        </text:list-item>
        <text:list-item>
          <text:p text:style-name="P5">def getInNeighbours(self, vertex) → returns an iterator to the in neighbours of the specified vertex</text:p>
        </text:list-item>
        <text:list-item>
          <text:p text:style-name="P5">def noEdges(self) → returns the number of arcs in the graph</text:p>
        </text:list-item>
        <text:list-item>
          <text:p text:style-name="P5">def noVertices(self)→ returns the number of vertices in the graph</text:p>
        </text:list-item>
        <text:list-item>
          <text:p text:style-name="P5">def isEdge(self, x, y)→ returns true iff there is an arc from the vertex x to the vertex y</text:p>
        </text:list-item>
        <text:list-item>
          <text:p text:style-name="P6"><text:span text:style-name="T1">def inDegree(self, vertex) → </text:span><text:span text:style-name="T2">returns the in degree of the specified vertex</text:span></text:p>
        </text:list-item>
        <text:list-item>
          <text:p text:style-name="P7"><text:span text:style-name="T3">def </text:span><text:span text:style-name="T4">out</text:span><text:span text:style-name="T3">Degree(self, vertex) → </text:span>returns the <text:span text:style-name="T4">out</text:span> degree of the specified vertex</text:p>
        </text:list-item>
        <text:list-item>
          <text:p text:style-name="P7">def setCost(self, x, y, cost) → <text:span text:style-name="T4">sets the cost of the arc from vertex x to vertex y with the one specified if it exist or does nothing if it does not exist</text:span></text:p>
        </text:list-item>
        <text:list-item>
          <text:p text:style-name="P8">def getCost(self, x, y) → <text:span text:style-name="T5">returns the cost of the arc from vertex x to vertex y if it exist or 0 if it does not exist</text:span></text:p>
        </text:list-item>
        <text:list-item>
          <text:p text:style-name="P8">def removeEdge(self, x, y) → <text:span text:style-name="T5">removes the arc from vertex x to vertex y if it exists or does nothing if it does not exist</text:span></text:p>
        </text:list-item>
        <text:list-item>
          <text:p text:style-name="P8">def addVertex(self, vertex) → <text:span text:style-name="T5">adds the specified vertex to the graph</text:span></text:p>
        </text:list-item>
        <text:list-item>
          <text:p text:style-name="P8">def removeVertex(self, vertex) → <text:span text:style-name="T5">removes the specified vertex fro the graph</text:span></text:p>
        </text:list-item>
        <text:list-item>
          <text:p text:style-name="P8">def copy(self) → <text:span text:style-name="T5">returns a deep copy of the graph</text:span></text:p>
        </text:list-item>
      </text:list>
      <text:p text:style-name="P9">We also have the following external functions:</text:p>
      <text:list text:style-name="L2">
        <text:list-item>
          <text:p text:style-name="P10">def readGraph(filename) → reads and returns the graph from the filename</text:p>
        </text:list-item>
        <text:list-item>
          <text:p text:style-name="P10">def printGraph(g, filename) → writes g in the filename</text:p>
        </text:list-item>
        <text:list-item>
          <text:p text:style-name="P10">def randomGraph(n, m, cost = False) → generates and returns a random graph with n vertices and m edges, if cost is True it gives it edge a cost between 0 and 100, else all the edges have cost 0</text:p>
        </text:list-item>
      </text:list>
      <text:p text:style-name="P1">Implementation</text:p>
      <text:p text:style-name="P2"/>
      <text:p text:style-name="P11">We have 2 dictionaries that map each vertex to a set of inbound neighbours and a set of outbound neighbours. We also have a dictionary that maps each edge, represented as a pair of vertices, to a cost. We keep a set of all the active vertices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22:01:02.497400694</meta:creation-date>
    <meta:print-date>2026-03-25T22:39:21.509180193</meta:print-date>
    <meta:printed-by>PDF files</meta:printed-by>
    <dc:date>2026-03-25T22:39:45.127933237</dc:date>
    <meta:editing-duration>PT23S</meta:editing-duration>
    <meta:editing-cycles>1</meta:editing-cycles>
    <meta:document-statistic meta:table-count="0" meta:image-count="0" meta:object-count="0" meta:page-count="1" meta:paragraph-count="24" meta:word-count="408" meta:character-count="2152" meta:non-whitespace-character-count="1787"/>
    <meta:generator>LibreOffice/26.2.2.2$Linux_X86_64 LibreOffice_project/620$Build-2</meta:generator>
  </office:meta>
</office:document-meta>
</file>